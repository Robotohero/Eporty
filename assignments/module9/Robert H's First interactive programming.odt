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7600000257BA6E601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3a63" officeooo:paragraph-rsid="00153a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in" svg:y="1.2709in" svg:width="6.9252in" svg:height="2.9665in" draw:z-index="0"><draw:image xlink:href="Pictures/100000010000057600000257BA6E6012.png" xlink:type="simple" xlink:show="embed" xlink:actuate="onLoad" draw:mime-type="image/png"/></draw:frame>Robert Herrera’s programming project making a dance party on code.org this is the code us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4T22:45:21.862189900</meta:creation-date>
    <dc:date>2026-06-14T22:47:54.135958300</dc:date>
    <meta:editing-duration>PT2M32S</meta:editing-duration>
    <meta:editing-cycles>1</meta:editing-cycles>
    <meta:document-statistic meta:table-count="0" meta:image-count="1" meta:object-count="0" meta:page-count="1" meta:paragraph-count="1" meta:word-count="15" meta:character-count="92" meta:non-whitespace-character-count="78"/>
    <meta:generator>LibreOffice/26.2.3.2$Windows_X86_64 LibreOffice_project/70e089b17412e4cb7773e41413306b17a2328c34</meta:generator>
  </office:meta>
</office:document-meta>
</file>